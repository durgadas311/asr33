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Contents_20_2">
      <style:paragraph-properties>
        <style:tab-stops>
          <style:tab-stop style:position="6.728in" style:type="right" style:leader-style="dotted" style:leader-text="."/>
        </style:tab-stops>
      </style:paragraph-properties>
    </style:style>
    <style:style style:name="P2" style:family="paragraph" style:parent-style-name="Contents_20_3">
      <style:paragraph-properties>
        <style:tab-stops>
          <style:tab-stop style:position="6.5307in" style:type="right" style:leader-style="dotted" style:leader-text="."/>
        </style:tab-stops>
      </style:paragraph-properties>
    </style:style>
    <style:style style:name="P3" style:family="paragraph" style:parent-style-name="Contents_20_4">
      <style:paragraph-properties>
        <style:tab-stops>
          <style:tab-stop style:position="6.3339in" style:type="right" style:leader-style="dotted" style:leader-text="."/>
        </style:tab-stops>
      </style:paragraph-properties>
    </style:style>
    <style:style style:name="P4" style:family="paragraph" style:parent-style-name="Heading_20_3">
      <style:text-properties officeooo:paragraph-rsid="001d2c91"/>
    </style:style>
    <style:style style:name="P5" style:family="paragraph" style:parent-style-name="Heading_20_3">
      <style:text-properties officeooo:paragraph-rsid="00252fce"/>
    </style:style>
    <style:style style:name="P6" style:family="paragraph" style:parent-style-name="Heading_20_4">
      <style:text-properties officeooo:paragraph-rsid="0019e490"/>
    </style:style>
    <style:style style:name="P7" style:family="paragraph" style:parent-style-name="Heading_20_4">
      <style:text-properties officeooo:paragraph-rsid="00252fce"/>
    </style:style>
    <style:style style:name="P8" style:family="paragraph" style:parent-style-name="List_20_Contents">
      <style:paragraph-properties fo:margin-top="0in" fo:margin-bottom="0.1965in" style:contextual-spacing="false"/>
    </style:style>
    <style:style style:name="P9" style:family="paragraph" style:parent-style-name="List_20_Contents">
      <style:text-properties officeooo:paragraph-rsid="001b11bc"/>
    </style:style>
    <style:style style:name="P10" style:family="paragraph" style:parent-style-name="List_20_Contents">
      <style:text-properties officeooo:paragraph-rsid="001d2c91"/>
    </style:style>
    <style:style style:name="P11" style:family="paragraph" style:parent-style-name="List_20_Contents">
      <style:text-properties officeooo:paragraph-rsid="00241417"/>
    </style:style>
    <style:style style:name="P12" style:family="paragraph" style:parent-style-name="List_20_Contents">
      <style:paragraph-properties fo:margin-left="0.4925in" fo:margin-top="0in" fo:margin-bottom="0in" style:contextual-spacing="false" fo:text-indent="0in" style:auto-text-indent="false"/>
    </style:style>
    <style:style style:name="P13" style:family="paragraph" style:parent-style-name="List_20_Contents">
      <style:paragraph-properties fo:margin-left="0.4925in" fo:margin-top="0in" fo:margin-bottom="0.1965in" style:contextual-spacing="false" fo:text-indent="0in" style:auto-text-indent="false"/>
      <style:text-properties officeooo:rsid="00252fce" officeooo:paragraph-rsid="00252fce"/>
    </style:style>
    <style:style style:name="P14" style:family="paragraph" style:parent-style-name="List_20_Heading">
      <style:text-properties officeooo:paragraph-rsid="001b11bc"/>
    </style:style>
    <style:style style:name="P15" style:family="paragraph" style:parent-style-name="List_20_Heading" style:master-page-name="">
      <style:paragraph-properties style:page-number="auto" fo:keep-with-next="always"/>
      <style:text-properties officeooo:paragraph-rsid="001b11bc"/>
    </style:style>
    <style:style style:name="P16" style:family="paragraph" style:parent-style-name="List_20_Heading">
      <style:text-properties officeooo:paragraph-rsid="001d2c91"/>
    </style:style>
    <style:style style:name="P17" style:family="paragraph" style:parent-style-name="List_20_Heading">
      <style:text-properties officeooo:paragraph-rsid="00252fce"/>
    </style:style>
    <style:style style:name="P18" style:family="paragraph" style:parent-style-name="List_20_Heading" style:master-page-name="">
      <style:paragraph-properties style:page-number="auto" fo:keep-with-next="always"/>
    </style:style>
    <style:style style:name="P19" style:family="paragraph" style:parent-style-name="Text_20_body" style:list-style-name="L1"/>
    <style:style style:name="P20" style:family="paragraph" style:parent-style-name="Text_20_body" style:list-style-name="L1">
      <style:paragraph-properties fo:margin-top="0in" fo:margin-bottom="0in" style:contextual-spacing="false"/>
    </style:style>
    <style:style style:name="P21" style:family="paragraph" style:parent-style-name="Text_20_body">
      <style:paragraph-properties fo:text-align="center" style:justify-single-word="false"/>
    </style:style>
    <style:style style:name="P22" style:family="paragraph" style:parent-style-name="Text_20_body">
      <style:text-properties officeooo:paragraph-rsid="00179028"/>
    </style:style>
    <style:style style:name="P23" style:family="paragraph" style:parent-style-name="Text_20_body">
      <style:paragraph-properties fo:margin-left="0.7874in" fo:text-indent="0in" style:auto-text-indent="false"/>
      <style:text-properties officeooo:paragraph-rsid="0019e490"/>
    </style:style>
    <style:style style:name="P24" style:family="paragraph" style:parent-style-name="Text_20_body">
      <style:text-properties officeooo:paragraph-rsid="001fdf7d"/>
    </style:style>
    <style:style style:name="P25" style:family="paragraph" style:parent-style-name="Text_20_body">
      <style:text-properties officeooo:rsid="002183d8" officeooo:paragraph-rsid="002183d8"/>
    </style:style>
    <style:style style:name="P26" style:family="paragraph" style:parent-style-name="Text_20_body">
      <style:text-properties officeooo:paragraph-rsid="002183d8"/>
    </style:style>
    <style:style style:name="P27" style:family="paragraph" style:parent-style-name="Text_20_body">
      <style:text-properties officeooo:paragraph-rsid="00252fce"/>
    </style:style>
    <style:style style:name="T1" style:family="text">
      <style:text-properties fo:font-style="italic"/>
    </style:style>
    <style:style style:name="T2" style:family="text">
      <style:text-properties fo:font-style="italic" officeooo:rsid="001b11bc" style:font-style-asian="italic" style:font-style-complex="italic"/>
    </style:style>
    <style:style style:name="T3" style:family="text">
      <style:text-properties fo:font-style="italic" officeooo:rsid="001c6db8" style:font-style-asian="italic" style:font-style-complex="italic"/>
    </style:style>
    <style:style style:name="T4" style:family="text">
      <style:text-properties fo:font-style="italic" officeooo:rsid="001d2c91" style:font-style-asian="italic" style:font-style-complex="italic"/>
    </style:style>
    <style:style style:name="T5" style:family="text">
      <style:text-properties fo:font-style="italic" fo:font-weight="normal" officeooo:rsid="001c6db8" style:font-style-asian="italic" style:font-weight-asian="normal" style:font-style-complex="italic" style:font-weight-complex="normal"/>
    </style:style>
    <style:style style:name="T6" style:family="text">
      <style:text-properties fo:font-weight="bold" style:font-weight-asian="bold" style:font-weight-complex="bold"/>
    </style:style>
    <style:style style:name="T7" style:family="text">
      <style:text-properties fo:font-weight="bold" officeooo:rsid="001c6db8" style:font-weight-asian="bold" style:font-weight-complex="bold"/>
    </style:style>
    <style:style style:name="T8" style:family="text">
      <style:text-properties fo:font-weight="bold" officeooo:rsid="001b11bc" style:font-weight-asian="bold" style:font-weight-complex="bold"/>
    </style:style>
    <style:style style:name="T9" style:family="text">
      <style:text-properties fo:font-weight="bold" officeooo:rsid="001d2c91" style:font-weight-asian="bold" style:font-weight-complex="bold"/>
    </style:style>
    <style:style style:name="T10" style:family="text">
      <style:text-properties fo:font-weight="bold" officeooo:rsid="00252fce" style:font-weight-asian="bold" style:font-weight-complex="bold"/>
    </style:style>
    <style:style style:name="T11" style:family="text">
      <style:text-properties fo:font-weight="bold" officeooo:rsid="0026a7fd" style:font-weight-asian="bold" style:font-weight-complex="bold"/>
    </style:style>
    <style:style style:name="T12" style:family="text">
      <style:text-properties fo:font-size="18pt" fo:font-weight="bold" style:font-size-asian="18pt" style:font-weight-asian="bold" style:font-size-complex="18pt" style:font-weight-complex="bold"/>
    </style:style>
    <style:style style:name="T13" style:family="text">
      <style:text-properties fo:font-size="18pt" fo:font-weight="bold" officeooo:rsid="0015cd58" style:font-size-asian="18pt" style:font-weight-asian="bold" style:font-size-complex="18pt" style:font-weight-complex="bold"/>
    </style:style>
    <style:style style:name="T14" style:family="text">
      <style:text-properties fo:font-size="10pt" style:font-size-asian="10pt" style:font-size-complex="10pt"/>
    </style:style>
    <style:style style:name="T15" style:family="text">
      <style:text-properties fo:font-size="10pt" officeooo:rsid="000ff864" style:font-size-asian="10pt" style:font-size-complex="10pt"/>
    </style:style>
    <style:style style:name="T16" style:family="text">
      <style:text-properties fo:font-size="10pt" fo:font-style="italic" style:font-size-asian="10pt" style:font-size-complex="10pt"/>
    </style:style>
    <style:style style:name="T17" style:family="text">
      <style:text-properties fo:font-size="10pt" fo:font-style="italic" officeooo:rsid="000ff864" style:font-size-asian="10pt" style:font-size-complex="10pt"/>
    </style:style>
    <style:style style:name="T18" style:family="text">
      <style:text-properties fo:font-size="10pt" fo:font-weight="bold" style:font-size-asian="10pt" style:font-weight-asian="bold" style:font-size-complex="10pt" style:font-weight-complex="bold"/>
    </style:style>
    <style:style style:name="T19" style:family="text">
      <style:text-properties fo:font-size="10pt" fo:font-weight="bold" officeooo:rsid="000ff864" style:font-size-asian="10pt" style:font-weight-asian="bold" style:font-size-complex="10pt" style:font-weight-complex="bold"/>
    </style:style>
    <style:style style:name="T20" style:family="text">
      <style:text-properties fo:font-size="10pt" fo:font-weight="bold" officeooo:rsid="0019e490" style:font-size-asian="10pt" style:font-weight-asian="bold" style:font-size-complex="10pt" style:font-weight-complex="bold"/>
    </style:style>
    <style:style style:name="T21" style:family="text">
      <style:text-properties officeooo:rsid="000e5adb"/>
    </style:style>
    <style:style style:name="T22" style:family="text">
      <style:text-properties officeooo:rsid="0018a80c"/>
    </style:style>
    <style:style style:name="T23" style:family="text">
      <style:text-properties style:font-name="Liberation Mono" fo:font-size="10pt" fo:font-weight="bold" officeooo:rsid="000ff864" style:font-size-asian="10pt" style:font-weight-asian="bold" style:font-size-complex="10pt" style:font-weight-complex="bold"/>
    </style:style>
    <style:style style:name="T24" style:family="text">
      <style:text-properties style:font-name="Liberation Serif1" fo:font-size="12pt" officeooo:rsid="000ff864" style:font-size-asian="12pt" style:font-size-complex="12pt"/>
    </style:style>
    <style:style style:name="T25" style:family="text">
      <style:text-properties style:font-name="Liberation Serif1" fo:font-size="12pt" officeooo:rsid="00112d41" style:font-size-asian="12pt" style:font-size-complex="12pt"/>
    </style:style>
    <style:style style:name="T26" style:family="text">
      <style:text-properties style:font-name="Liberation Serif1" fo:font-size="12pt" officeooo:rsid="0019e490" style:font-size-asian="12pt" style:font-size-complex="12pt"/>
    </style:style>
    <style:style style:name="T27" style:family="text">
      <style:text-properties officeooo:rsid="0019e490"/>
    </style:style>
    <style:style style:name="T28" style:family="text">
      <style:text-properties officeooo:rsid="001ac30b"/>
    </style:style>
    <style:style style:name="T29" style:family="text">
      <style:text-properties officeooo:rsid="001b11bc"/>
    </style:style>
    <style:style style:name="T30" style:family="text">
      <style:text-properties officeooo:rsid="001c6db8"/>
    </style:style>
    <style:style style:name="T31" style:family="text">
      <style:text-properties fo:font-weight="normal" officeooo:rsid="0026a7fd" style:font-weight-asian="normal" style:font-weight-complex="normal"/>
    </style:style>
    <style:style style:name="T32" style:family="text">
      <style:text-properties officeooo:rsid="001d2c91"/>
    </style:style>
    <style:style style:name="T33" style:family="text">
      <style:text-properties officeooo:rsid="001f0344"/>
    </style:style>
    <style:style style:name="T34" style:family="text">
      <style:text-properties style:font-name="Liberation Serif" style:font-name-asian="Liberation Serif" style:font-name-complex="Liberation Serif"/>
    </style:style>
    <style:style style:name="T35" style:family="text">
      <style:text-properties style:font-name="Liberation Serif" officeooo:rsid="001fdf7d" style:font-name-asian="Liberation Serif" style:font-name-complex="Liberation Serif"/>
    </style:style>
    <style:style style:name="T36" style:family="text">
      <style:text-properties style:font-name="Liberation Serif" fo:font-weight="bold" style:font-name-asian="Liberation Serif" style:font-weight-asian="bold" style:font-name-complex="Liberation Serif" style:font-weight-complex="bold"/>
    </style:style>
    <style:style style:name="T37" style:family="text">
      <style:text-properties officeooo:rsid="0026a7f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number:date-style style:name="N41"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T13">Virtual </text:span><text:span text:style-name="T12">ASR33 Teletype</text:span><text:line-break/><text:date style:data-style-name="N41" text:date-value="2026-06-09T09:42:05.271853990">June 9, 2026</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6521_3940028066" text:style-name="Index_20_Link" text:visited-style-name="Index_20_Link">Running<text:tab/>1</text:a></text:p>
          <text:p text:style-name="P3"><text:a xlink:type="simple" xlink:href="#__RefHeading___Toc6502_3940028066%20Copy%201" text:style-name="Index_20_Link" text:visited-style-name="Index_20_Link">Telnet version<text:tab/>1</text:a></text:p>
          <text:p text:style-name="P3"><text:a xlink:type="simple" xlink:href="#__RefHeading___Toc6504_3940028066%20Copy%201" text:style-name="Index_20_Link" text:visited-style-name="Index_20_Link">Tty version<text:tab/>1</text:a></text:p>
          <text:p text:style-name="P2"><text:a xlink:type="simple" xlink:href="#__RefHeading___Toc6523_3940028066" text:style-name="Index_20_Link" text:visited-style-name="Index_20_Link">Controls<text:tab/>1</text:a></text:p>
          <text:p text:style-name="P3"><text:a xlink:type="simple" xlink:href="#__RefHeading___Toc6525_3940028066" text:style-name="Index_20_Link" text:visited-style-name="Index_20_Link">Keyboard<text:tab/>2</text:a></text:p>
          <text:p text:style-name="P3"><text:a xlink:type="simple" xlink:href="#__RefHeading___Toc6527_3940028066" text:style-name="Index_20_Link" text:visited-style-name="Index_20_Link">Misc<text:tab/>3</text:a></text:p>
          <text:p text:style-name="P3"><text:a xlink:type="simple" xlink:href="#__RefHeading___Toc6529_3940028066" text:style-name="Index_20_Link" text:visited-style-name="Index_20_Link">Telnet version<text:tab/>3</text:a></text:p>
          <text:p text:style-name="P3"><text:a xlink:type="simple" xlink:href="#__RefHeading___Toc6504_3940028066" text:style-name="Index_20_Link" text:visited-style-name="Index_20_Link">Tty version<text:tab/>3</text:a></text:p>
          <text:p text:style-name="P1"><text:a xlink:type="simple" xlink:href="#__RefHeading___Toc6531_3940028066" text:style-name="Index_20_Link" text:visited-style-name="Index_20_Link">Properties<text:tab/>3</text:a></text:p>
          <text:p text:style-name="P2"><text:a xlink:type="simple" xlink:href="#__RefHeading___Toc6533_3940028066" text:style-name="Index_20_Link" text:visited-style-name="Index_20_Link">Teletype Option Properties<text:tab/>4</text:a></text:p>
          <text:p text:style-name="P2"><text:a xlink:type="simple" xlink:href="#__RefHeading___Toc6535_3940028066" text:style-name="Index_20_Link" text:visited-style-name="Index_20_Link">Telnet Properties<text:tab/>5</text:a></text:p>
          <text:p text:style-name="P2"><text:a xlink:type="simple" xlink:href="#__RefHeading___Toc6535_3940028066%20Copy%201" text:style-name="Index_20_Link" text:visited-style-name="Index_20_Link">Tty Properties<text:tab/>5</text:a></text:p>
        </text:index-body>
      </text:table-of-content>
      <text:p text:style-name="Text_20_body"/>
      <text:h text:style-name="Heading_20_3" text:outline-level="3"><text:bookmark-start text:name="__RefHeading___Toc6521_3940028066"/>Running<text:bookmark-end text:name="__RefHeading___Toc6521_3940028066"/></text:h>
      <text:p text:style-name="P22"><text:span text:style-name="T21">There are example “bash” scripts showing how to run the telnet and tty (serial port) variants. Serial ports require the external package jSerialComm, which is a submodule in git repository. </text:span>The general command<text:span text:style-name="T22">line </text:span>syntax is: </text:p>
      <text:h text:style-name="P6" text:outline-level="4"><text:bookmark-start text:name="__RefHeading___Toc6502_3940028066 Copy 1"/>Telnet version<text:bookmark-end text:name="__RefHeading___Toc6502_3940028066 Copy 1"/></text:h>
      <text:p text:style-name="P23"><text:span text:style-name="User_20_Entry"><text:span text:style-name="T19">j</text:span></text:span><text:span text:style-name="User_20_Entry"><text:span text:style-name="T18">ava -</text:span></text:span><text:span text:style-name="User_20_Entry"><text:span text:style-name="T19">jar </text:span></text:span><text:span text:style-name="User_20_Entry"><text:span text:style-name="T20">ASR33</text:span></text:span><text:span text:style-name="User_20_Entry"><text:span text:style-name="T19">telnet.jar</text:span></text:span><text:span text:style-name="User_20_Entry"><text:span text:style-name="T14"> [</text:span></text:span><text:span text:style-name="User_20_Entry"><text:span text:style-name="T16">prop</text:span></text:span><text:span text:style-name="User_20_Entry"><text:span text:style-name="T14">=</text:span></text:span><text:span text:style-name="User_20_Entry"><text:span text:style-name="T16">value</text:span></text:span><text:span text:style-name="User_20_Entry"><text:span text:style-name="T14">...] [</text:span></text:span><text:span text:style-name="User_20_Entry"><text:span text:style-name="T16">host</text:span></text:span><text:span text:style-name="User_20_Entry"><text:span text:style-name="T14"> </text:span></text:span><text:span text:style-name="User_20_Entry"><text:span text:style-name="T16">port</text:span></text:span><text:span text:style-name="User_20_Entry"><text:span text:style-name="T14">]</text:span></text:span> </text:p>
      <text:h text:style-name="P6" text:outline-level="4"><text:bookmark-start text:name="__RefHeading___Toc6504_3940028066 Copy 1"/>T<text:span text:style-name="T21">ty</text:span> version<text:bookmark-end text:name="__RefHeading___Toc6504_3940028066 Copy 1"/></text:h>
      <text:p text:style-name="P23"><text:line-break/><text:span text:style-name="T23">j</text:span><text:span text:style-name="User_20_Entry"><text:span text:style-name="T18">ava -</text:span></text:span><text:span text:style-name="User_20_Entry"><text:span text:style-name="T19">cp ${JARS} </text:span></text:span><text:span text:style-name="User_20_Entry"><text:span text:style-name="T20">ASR33</text:span></text:span><text:span text:style-name="User_20_Entry"><text:span text:style-name="T19">tty</text:span></text:span><text:span text:style-name="User_20_Entry"><text:span text:style-name="T14"> [</text:span></text:span><text:span text:style-name="User_20_Entry"><text:span text:style-name="T16">prop</text:span></text:span><text:span text:style-name="User_20_Entry"><text:span text:style-name="T14">=</text:span></text:span><text:span text:style-name="User_20_Entry"><text:span text:style-name="T16">value</text:span></text:span><text:span text:style-name="User_20_Entry"><text:span text:style-name="T14">...] [</text:span></text:span><text:span text:style-name="User_20_Entry"><text:span text:style-name="T15">t</text:span></text:span><text:span text:style-name="User_20_Entry"><text:span text:style-name="T17">ty</text:span></text:span><text:span text:style-name="User_20_Entry"><text:span text:style-name="T14"> </text:span></text:span><text:span text:style-name="User_20_Entry"><text:span text:style-name="T15">b</text:span></text:span><text:span text:style-name="User_20_Entry"><text:span text:style-name="T17">aud</text:span></text:span><text:span text:style-name="User_20_Entry"><text:span text:style-name="T14">]</text:span></text:span></text:p>
      <text:p text:style-name="P23"><text:span text:style-name="User_20_Entry"><text:span text:style-name="T24">Where “${JARS}” </text:span></text:span><text:span text:style-name="User_20_Entry"><text:span text:style-name="T25">here</text:span></text:span><text:span text:style-name="User_20_Entry"><text:span text:style-name="T24"> represents the paths to the jar files required to run, </text:span></text:span><text:span text:style-name="User_20_Entry"><text:span text:style-name="T25">specifically</text:span></text:span><text:span text:style-name="User_20_Entry"><text:span text:style-name="T24"> </text:span></text:span><text:span text:style-name="User_20_Entry"><text:span text:style-name="T26">ASR33</text:span></text:span><text:span text:style-name="User_20_Entry"><text:span text:style-name="T24">tty.jar and jSerialComm-2.9.3.jar, separated by a colon (Linux/MAC) or semi-colon (Windows).</text:span></text:span></text:p>
      <text:h text:style-name="Heading_20_3" text:outline-level="3"><text:bookmark-start text:name="__RefHeading___Toc6523_3940028066"/>Controls<text:bookmark-end text:name="__RefHeading___Toc6523_3940028066"/></text:h>
      <text:p text:style-name="Text_20_body">The menu item <text:span text:style-name="T6">Ptape</text:span><text:span text:style-name="T35">►</text:span><text:span text:style-name="T6">Punch</text:span> selects a file to use for the paper tape punch. Any previous content is lost. Clicking "Cancel" leaves no file selected (punch not operational). Editing (backspacing, <text:span text:style-name="T27">the B.SP. button</text:span>) is not supported. </text:p>
      <text:p text:style-name="P24">The menu item <text:span text:style-name="T6">PTape</text:span><text:span text:style-name="T35">►</text:span><text:span text:style-name="T6">Reader</text:span> selects a file to use for the paper tape reader. In order to re-wind a file, re-select it from this menu. Clicking "Cancel" leaves no file selected (reader not operational). </text:p>
      <text:p text:style-name="Text_20_body"><text:soft-page-break/>LOCAL checkbox selects between LOCAL (checked) or LINE (unchecked) mode of operation. In LOCAL mode all characters from the remote are dropped and keys pressed are not sent to the remote but rather printed locally. </text:p>
      <text:p text:style-name="Text_20_body">If a file has been mounted on the Punch device, the PUNCH checkbox indicates whether the punch is on - in which case anything printed will also be punched. </text:p>
      <text:p text:style-name="Text_20_body">If a file has been mounted on the Reader device, the READER checkbox indicates whether the reader is enabled (ready – <text:span text:style-name="T27">AUTO on some models</text:span>) - in which case it is turned on and off by X-ON and X-OFF characters or does a single-character read if a command is received. </text:p>
      <text:p text:style-name="Text_20_body">This implementation recognizes the SI character (Ctrl-O, 0x0F) to trigger a single character read from tape. That character may be changed with the "rdr_adv_char" property. <text:span text:style-name="T28">Only control characters are tested for this character, so setting to <text:s/>any value greater than or equal to 32 (0x20, SP) effectively disables the feature.</text:span></text:p>
      <text:p text:style-name="Text_20_body">If the Reader is in the ready state, the "start" button may be used to start reading tape and sending to the remote. Whenever the reader is active, the "start" button will be illuminated. </text:p>
      <text:p text:style-name="P24">The menu item <text:span text:style-name="T6">PTape</text:span><text:span text:style-name="T35">►</text:span><text:span text:style-name="T6">Rdr_Position</text:span> will pop-up with window allowing positioning of the paper tape in the reader. The reader is disabled during this operation <text:span text:style-name="T28">(same as being in the FREE position)</text:span>. The keys UP, DOWN, <text:span text:style-name="T6">P</text:span><text:span text:style-name="T11">age</text:span><text:span text:style-name="T6">_U</text:span><text:span text:style-name="T11">p</text:span>, and <text:span text:style-name="T6">P</text:span><text:span text:style-name="T11">age</text:span><text:span text:style-name="T6">_D</text:span><text:span text:style-name="T11">own</text:span>, along with the mouse wheel, will reposition the tape. <text:span text:style-name="T6">H</text:span><text:span text:style-name="T11">ome</text:span> jumps to the beginning, and <text:span text:style-name="T11">End</text:span> jumps to the end. <text:span text:style-name="T28">Note that the beginning of the tape is “down” </text:span><text:span text:style-name="T37">in the view, and the keys/actions are moving the *tape*, not the view</text:span><text:span text:style-name="T28">.</text:span> Press <text:span text:style-name="T6">E</text:span><text:span text:style-name="T11">nter</text:span> or Close the window to set the new position and release the reader. <text:span text:style-name="T37">Press </text:span><text:span text:style-name="T11">Delete</text:span><text:span text:style-name="T31"> to cancel without changing position.</text:span></text:p>
      <text:p text:style-name="P25">The menu item <text:span text:style-name="T6">Print</text:span><text:span text:style-name="T35">►</text:span><text:span text:style-name="T36">Tear_Off</text:span><text:span text:style-name="T34"> will discard all text currently “printed”, clearing the window.</text:span></text:p>
      <text:p text:style-name="P25">The menu item <text:span text:style-name="T6">Print</text:span><text:span text:style-name="T35">►</text:span><text:span text:style-name="T36">Save</text:span><text:span text:style-name="T34"> allows saving all text currently “printed” to a file.</text:span></text:p>
      <text:p text:style-name="P25"><text:span text:style-name="T34">A scroll bar on the right side allows looking back in currently “printed” text. There is currently no way to view/monitor paper tape being punched, nor is there a “live view” of the paper tape reader.</text:span></text:p>
      <text:h text:style-name="Heading_20_4" text:outline-level="4"><text:bookmark-start text:name="__RefHeading___Toc6525_3940028066"/>Keyboard<text:bookmark-end text:name="__RefHeading___Toc6525_3940028066"/></text:h>
      <text:p text:style-name="Text_20_body">F12 functions as the HERE IS key. The answer-back drum defaults to <text:span text:style-name="T28">20</text:span> NUL characters <text:span text:style-name="T28">(often used to make blank leader/trailer on punched paper tape)</text:span>, but may be set to a string using the "ansbak" property (20 characters maximum). </text:p>
      <text:p text:style-name="Text_20_body">The Enter key produces CR, use Ctrl-J <text:span text:style-name="T29">or Ctrl-Enter </text:span>for LF. </text:p>
      <text:p text:style-name="Text_20_body">All characters in the last ASCII-7 bank (lower case letters, etc) except DEL (0x7f) are folded into the upper-case bank. </text:p>
      <text:p text:style-name="Text_20_body">The Delete key produces the RUBOUT character 0x7f. </text:p>
      <text:p text:style-name="P24">The menu item <text:span text:style-name="T6">Print</text:span><text:span text:style-name="T35">►</text:span><text:span text:style-name="T6">Copy</text:span> (also Alt-C) will copy any selected text (the usual mouse click-drag) to the clipboard. </text:p>
      <text:p text:style-name="P24">The menu item <text:span text:style-name="T6">Print</text:span><text:span text:style-name="T35">►</text:span><text:span text:style-name="T6">Paste</text:span> (also Alt-V or middle mouse button) will paste text from the clipboard as keyboard input. <text:span text:style-name="T29">This does not paste text to the “printed page”.</text:span> </text:p>
      <text:h text:style-name="Heading_20_4" text:outline-level="4"><text:bookmark-start text:name="__RefHeading___Toc6527_3940028066"/><text:soft-page-break/>Misc<text:bookmark-end text:name="__RefHeading___Toc6527_3940028066"/></text:h>
      <text:p text:style-name="Text_20_body">Two modes are possible for the telnet version, "server" or client <text:span text:style-name="T29">(default)</text:span>. </text:p>
      <text:p text:style-name="Text_20_body">Characters transmitted for the Reader or HERE IS function, or pasted into the window, are delayed according to the "delay" property, the number of milliseconds to delay after each character. Default is 100 milliseconds. <text:span text:style-name="T29">The CR may incur a different delay according to the “cr_delay” property. Default CR delay is 1000 milliseconds.</text:span></text:p>
      <text:p text:style-name="Text_20_body">Pasted text being transmitted may be canceled by pressing the F1 key. </text:p>
      <text:h text:style-name="Heading_20_4" text:outline-level="4"><text:bookmark-start text:name="__RefHeading___Toc6529_3940028066"/>Telnet version<text:bookmark-end text:name="__RefHeading___Toc6529_3940028066"/></text:h>
      <text:p text:style-name="P26">(client) If the connection to the remote is lost or not present to begin with, the menu item <text:span text:style-name="T6">Print</text:span><text:span text:style-name="T35">►</text:span><text:span text:style-name="T6">Reconnect</text:span> may be used to attempt to re-connect to the remote using the same host and port. </text:p>
      <text:p text:style-name="P26">(client) A new, different, connection may be specified using the <text:span text:style-name="T6">Print</text:span><text:span text:style-name="T35">►</text:span><text:span text:style-name="T6">New_Connection</text:span> menu item. </text:p>
      <text:p text:style-name="P26">The current connection may be dropped using the <text:span text:style-name="T6">Print</text:span><text:span text:style-name="T35">►</text:span><text:span text:style-name="T6">Hangup</text:span> menu item. </text:p>
      <text:h text:style-name="P7" text:outline-level="4"><text:bookmark-start text:name="__RefHeading___Toc6504_3940028066"/>T<text:span text:style-name="T21">ty</text:span> version<text:bookmark-end text:name="__RefHeading___Toc6504_3940028066"/></text:h>
      <text:p text:style-name="P27">The menu item <text:span text:style-name="T6">Screen</text:span><text:span text:style-name="T35">►</text:span><text:span text:style-name="T6">New_Connection</text:span> will prompt for a new <text:span text:style-name="T21">tty</text:span> and <text:span text:style-name="T21">baud</text:span> and <text:span text:style-name="T21">then </text:span>attempt to <text:span text:style-name="T21">close and</text:span> <text:span text:style-name="T21">re-open the serial port</text:span>.</text:p>
      <text:h text:style-name="Heading_20_2" text:outline-level="2"><text:bookmark-start text:name="__RefHeading___Toc6531_3940028066"/>Properties<text:bookmark-end text:name="__RefHeading___Toc6531_3940028066"/></text:h>
      <text:p text:style-name="Text_20_body">Properties with the "asr33_" prefix may be specified on the commandline by removing the prefix. Quotes around values may be required, depending on your shell. <text:span text:style-name="T29">Boolean properties do not require a value, but do require a “=” when used on the commandline.</text:span></text:p>
      <text:p text:style-name="Text_20_body">The terminal will search for properties in the following order: </text:p>
      <text:list text:style-name="L1">
        <text:list-item>
          <text:p text:style-name="P20"><text:span text:style-name="T1">prop</text:span>=<text:span text:style-name="T1">value</text:span> arguments on the commandline </text:p>
        </text:list-item>
        <text:list-item>
          <text:p text:style-name="P20">Using the environment variable ASR33_CONFIG </text:p>
        </text:list-item>
        <text:list-item>
          <text:p text:style-name="P20">Looking for "asr33.rc" in the current directory </text:p>
        </text:list-item>
        <text:list-item>
          <text:p text:style-name="P19">Looking for ".asr33rc" in the user's home directory </text:p>
        </text:list-item>
      </text:list>
      <text:p text:style-name="Text_20_body">Only one properties file will be used - they are not combined. <text:span text:style-name="T29">Commandline properties will override (or supplement) whichever properties file was loaded.</text:span></text:p>
      <text:p text:style-name="List_20_Heading"><text:span text:style-name="T6">asr33_ansbak</text:span><text:span text:style-name="T8">=</text:span><text:span text:style-name="T2">string</text:span> </text:p>
      <text:p text:style-name="P11">Specifies a string to use for the Answer-back drum. Typically, this drum generate<text:span text:style-name="T29">s 20</text:span> NUL characters, and that is the default. A maximum of 20 characters is used, with the remaining positions on the drum being left as <text:span text:style-name="T29">disabled</text:span>. This string may include the standard "escapes" for special characters, such as "\r" for CR and "\n" for LF.</text:p>
      <text:p text:style-name="List_20_Heading"><text:span text:style-name="T6">asr33_delay</text:span><text:span text:style-name="T8">=</text:span><text:span text:style-name="T2">ms</text:span></text:p>
      <text:p text:style-name="List_20_Contents">The delay inserted after each character is pasted or otherwise automatically sent to the host, in milliseconds. Default is 100. <text:span text:style-name="T29">This does not affect typing from the keyboard.</text:span></text:p>
      <text:p text:style-name="P15"><text:soft-page-break/><text:span text:style-name="T6">asr33_</text:span><text:span text:style-name="T8">cr_</text:span><text:span text:style-name="T6">delay</text:span><text:span text:style-name="T8">=</text:span><text:span text:style-name="T2">ms</text:span></text:p>
      <text:p text:style-name="P9">The delay inserted after each <text:span text:style-name="T29">CR</text:span> is pasted or otherwise automatically sent to the host, in milliseconds. Default is 10<text:span text:style-name="T29">0</text:span>0. <text:span text:style-name="T29">This does not affect typing CR from the keyboard.</text:span></text:p>
      <text:p text:style-name="P14"><text:span text:style-name="T6">asr33_rdr_adv_char</text:span><text:span text:style-name="T7">=</text:span><text:span text:style-name="T3">value</text:span><text:line-break/><text:span text:style-name="T6">tty_rdr_adv_char</text:span><text:span text:style-name="T8">=</text:span><text:span text:style-name="T2">value</text:span></text:p>
      <text:p text:style-name="List_20_Contents">The control character to use for performing a single-character read operation ("advance") on the paper tape reader. This emulates the Teletype feature of a solenoid on the reader that is activated by a handshake signal on the host interface. This needs to match whatever is used on the host (e.g. MDS-800) to trigger the reader advance. Default is 0x0f (Ctrl-O). <text:span text:style-name="T30">Setting to a non-control character value ( &gt;=32) effectively disables the feature.</text:span></text:p>
      <text:p text:style-name="List_20_Heading"><text:span text:style-name="T6">asr33_rdr_view</text:span><text:span text:style-name="T7">=</text:span><text:span text:style-name="T3">num</text:span></text:p>
      <text:p text:style-name="List_20_Contents">The number of characters before and after the current in the reader tape positioning view. Default is 8. Must be between 1 and 30. </text:p>
      <text:p text:style-name="List_20_Heading"><text:span text:style-name="T6">asr33_bell</text:span><text:span text:style-name="T7">=</text:span><text:span text:style-name="T3">wav-file</text:span></text:p>
      <text:p text:style-name="List_20_Contents">The audio file to use for the bell sound. This file is buffered in memory, so needs to be small. Default is "bell.wav". </text:p>
      <text:p text:style-name="List_20_Heading"><text:span text:style-name="T6">asr33_bell_volume</text:span><text:span text:style-name="T7">=</text:span><text:span text:style-name="T5">percent</text:span></text:p>
      <text:p text:style-name="List_20_Contents">Specifies the audio volume to use for the bell, in percent. Default is "50". </text:p>
      <text:p text:style-name="List_20_Heading"><text:span text:style-name="T6">asr33_lines</text:span><text:span text:style-name="T7">=</text:span><text:span text:style-name="T3">num</text:span></text:p>
      <text:p text:style-name="List_20_Contents">Specifies the number of lines to view in the text window. Minimum is 10. Default is 24. Scrolling still allows viewing the entire printed text, this property only affects the view size. Beware of impractical numbers for your screen size. </text:p>
      <text:p text:style-name="List_20_Heading"><text:span text:style-name="T6">asr33_font_size</text:span><text:span text:style-name="T7">=</text:span><text:span text:style-name="T3">points</text:span></text:p>
      <text:p text:style-name="P12">Specifies the size of the font <text:span text:style-name="T30">(in points)</text:span> to use. Default is 12. Minimum is 4 and maximum is 30.</text:p>
      <text:p text:style-name="P17"><text:span text:style-name="T6">asr33_</text:span><text:span text:style-name="T10">live_ppt</text:span></text:p>
      <text:p text:style-name="P13">Enables a “live view” of the paper tape reader and punch. The views are fixed windows showing only the most-recently punched data or reader data before/after the next character to read.</text:p>
      <text:h text:style-name="P5" text:outline-level="3"><text:bookmark-start text:name="__RefHeading___Toc6533_3940028066"/><text:span text:style-name="T33">Teletype</text:span> Option Properties<text:bookmark-end text:name="__RefHeading___Toc6533_3940028066"/></text:h>
      <text:p text:style-name="Text_20_body">The following properties accept the values (case-insensitive) "yes", "true", "on", or "1" to enable an option. All other values disable. If the property is not set, the default value is used. </text:p>
      <text:p text:style-name="List_20_Heading"><text:span text:style-name="T6">asr33_auto_nl</text:span> </text:p>
      <text:p text:style-name="List_20_Contents">Enables the automatic CR-LF at column 80. Default is on. </text:p>
      <text:p text:style-name="List_20_Heading"><text:span text:style-name="T6">asr33_auto_rdr</text:span> </text:p>
      <text:p text:style-name="List_20_Contents">Enables the paper tape reader to respond to DC1/DC3. Default is on. </text:p>
      <text:p text:style-name="List_20_Heading"><text:span text:style-name="T6">asr33_auto_pun</text:span> </text:p>
      <text:p text:style-name="List_20_Contents">Enables the paper tape punch to respond to DC2/DC4. Default is on. </text:p>
      <text:p text:style-name="List_20_Heading"><text:span text:style-name="T6">asr33_cr_on_lf</text:span> </text:p>
      <text:p text:style-name="List_20_Contents">Enables the automatic CR when LF is received. Default is off. </text:p>
      <text:p text:style-name="List_20_Heading"><text:span text:style-name="T6">asr33_lf_on_cr</text:span> </text:p>
      <text:p text:style-name="List_20_Contents">Enables the automatic LF when CR is received. Mutually exclusive with <text:span text:style-name="T6">asr33_cr_on_lf</text:span>. Default is off. </text:p>
      <text:p text:style-name="List_20_Heading"><text:span text:style-name="T6">asr33_nonprint</text:span> </text:p>
      <text:p text:style-name="List_20_Contents">Enables the Print/Nonprint option, which adds a button to control whether or not received characters are printed (they are always punched if the punch is on). Default is off. </text:p>
      <text:p text:style-name="P18"><text:soft-page-break/><text:span text:style-name="T6">asr33_parity</text:span> </text:p>
      <text:p text:style-name="List_20_Contents">Enables generation of parity in the 8th bit of keyboard codes. Default is off. </text:p>
      <text:p text:style-name="List_20_Heading"><text:span text:style-name="T6">asr33_even</text:span> </text:p>
      <text:p text:style-name="List_20_Contents">Selects the state of the 8th bit of keyboard codes. Default is on when parity is enabled (EVEN parity), off when parity disabled (SPACE parity bit). </text:p>
      <text:p text:style-name="List_20_Heading"><text:span text:style-name="T6">asr33_col72_bell</text:span> </text:p>
      <text:p text:style-name="P8">Used to disable the margin bell after column 72. Default is enabled. </text:p>
      <text:h text:style-name="Heading_20_3" text:outline-level="3"><text:bookmark-start text:name="__RefHeading___Toc6535_3940028066"/>Telnet Properties<text:bookmark-end text:name="__RefHeading___Toc6535_3940028066"/></text:h>
      <text:p text:style-name="List_20_Heading"><text:span text:style-name="T6">asr33_host</text:span><text:span text:style-name="T7">=</text:span><text:span text:style-name="T3">host</text:span></text:p>
      <text:p text:style-name="List_20_Contents">The hostname or IP address to connect to. This is the same as the first non-property argument on the command line. </text:p>
      <text:p text:style-name="List_20_Heading"><text:span text:style-name="T6">asr33_port</text:span><text:span text:style-name="T7">=</text:span><text:span text:style-name="T3">port</text:span></text:p>
      <text:p text:style-name="List_20_Contents">The port number to connect to. This is the same as the second non-property argument on the command line. </text:p>
      <text:p text:style-name="List_20_Heading"><text:span text:style-name="T6">asr33_server</text:span> </text:p>
      <text:p text:style-name="P8">Sets server mode, where the ASR33 listens on the specified host and port, simulating a standalone case where the ASR33 waits for connections from remote ASR33s. Value is ignored, but must be present ("=" at least) when given on the commandline. <text:span text:style-name="T30">Property must be absent to turn off.</text:span></text:p>
      <text:h text:style-name="P4" text:outline-level="3"><text:bookmark-start text:name="__RefHeading___Toc6535_3940028066 Copy 1"/><text:span text:style-name="T32">Tty</text:span> Properties<text:bookmark-end text:name="__RefHeading___Toc6535_3940028066 Copy 1"/></text:h>
      <text:p text:style-name="P16"><text:span text:style-name="T6">asr33_</text:span><text:span text:style-name="T9">tty</text:span><text:span text:style-name="T7">=</text:span><text:span text:style-name="T4">device</text:span></text:p>
      <text:p text:style-name="P10">The <text:span text:style-name="T32">device path of the serial port</text:span> to connect to. This is the same as the first non-property argument on the command line. </text:p>
      <text:p text:style-name="P16"><text:span text:style-name="T6">asr33_</text:span><text:span text:style-name="T9">baud</text:span><text:span text:style-name="T7">=</text:span><text:span text:style-name="T4">speed</text:span></text:p>
      <text:p text:style-name="P10">The <text:span text:style-name="T32">speed (baud) to use on the selected serial port</text:span>. This is the same as the second non-property argument on the command line. </text:p>
      <text:p text:style-name="P16"><text:span text:style-name="T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in"/>
    </style:style>
    <style:style style:name="List_20_Contents" style:display-name="List Contents" style:family="paragraph" style:parent-style-name="Standard" style:class="html">
      <style:paragraph-properties fo:margin-left="0.3937in"/>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1"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08T09:41:31.254656199</meta:creation-date>
    <dc:date>2026-06-09T09:42:05.236469429</dc:date>
    <meta:editing-duration>PT18H57M42S</meta:editing-duration>
    <meta:editing-cycles>11</meta:editing-cycles>
    <meta:generator>LibreOffice/24.2.7.2$Linux_X86_64 LibreOffice_project/420$Build-2</meta:generator>
    <meta:print-date>2026-06-09T08:13:23.377204483</meta:print-date>
    <meta:printed-by>PDF files</meta:printed-by>
    <meta:document-statistic meta:table-count="0" meta:image-count="0" meta:object-count="0" meta:page-count="5" meta:paragraph-count="110" meta:word-count="1620" meta:character-count="9946" meta:non-whitespace-character-count="8384"/>
  </office:meta>
</office:document-meta>
</file>