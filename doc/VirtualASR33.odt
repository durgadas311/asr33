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3">
      <style:text-properties officeooo:paragraph-rsid="002c3a23"/>
    </style:style>
    <style:style style:name="P7" style:family="paragraph" style:parent-style-name="Heading_20_4">
      <style:text-properties officeooo:paragraph-rsid="0019e490"/>
    </style:style>
    <style:style style:name="P8" style:family="paragraph" style:parent-style-name="Heading_20_4">
      <style:text-properties officeooo:paragraph-rsid="00252fce"/>
    </style:style>
    <style:style style:name="P9" style:family="paragraph" style:parent-style-name="List_20_Contents">
      <style:paragraph-properties fo:margin-top="0in" fo:margin-bottom="0.1965in" style:contextual-spacing="false"/>
    </style:style>
    <style:style style:name="P10" style:family="paragraph" style:parent-style-name="List_20_Contents">
      <style:text-properties officeooo:paragraph-rsid="001b11bc"/>
    </style:style>
    <style:style style:name="P11" style:family="paragraph" style:parent-style-name="List_20_Contents">
      <style:text-properties officeooo:paragraph-rsid="001d2c91"/>
    </style:style>
    <style:style style:name="P12" style:family="paragraph" style:parent-style-name="List_20_Contents">
      <style:text-properties officeooo:paragraph-rsid="00241417"/>
    </style:style>
    <style:style style:name="P13" style:family="paragraph" style:parent-style-name="List_20_Contents">
      <style:paragraph-properties fo:margin-left="0.4925in" fo:margin-top="0in" fo:margin-bottom="0in" style:contextual-spacing="false" fo:text-indent="0in" style:auto-text-indent="false"/>
    </style:style>
    <style:style style:name="P14"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5" style:family="paragraph" style:parent-style-name="List_20_Contents">
      <style:text-properties officeooo:paragraph-rsid="0029840a"/>
    </style:style>
    <style:style style:name="P16" style:family="paragraph" style:parent-style-name="List_20_Contents">
      <style:paragraph-properties fo:margin-top="0in" fo:margin-bottom="0.1965in" style:contextual-spacing="false"/>
      <style:text-properties officeooo:paragraph-rsid="002c3a23"/>
    </style:style>
    <style:style style:name="P17" style:family="paragraph" style:parent-style-name="List_20_Contents">
      <style:paragraph-properties fo:margin-top="0in" fo:margin-bottom="0in" style:contextual-spacing="false"/>
    </style:style>
    <style:style style:name="P18" style:family="paragraph" style:parent-style-name="List_20_Heading">
      <style:text-properties officeooo:paragraph-rsid="001b11bc"/>
    </style:style>
    <style:style style:name="P19" style:family="paragraph" style:parent-style-name="List_20_Heading" style:master-page-name="">
      <style:paragraph-properties style:page-number="auto" fo:keep-with-next="always"/>
      <style:text-properties officeooo:paragraph-rsid="001b11bc"/>
    </style:style>
    <style:style style:name="P20" style:family="paragraph" style:parent-style-name="List_20_Heading">
      <style:text-properties officeooo:paragraph-rsid="001d2c91"/>
    </style:style>
    <style:style style:name="P21" style:family="paragraph" style:parent-style-name="List_20_Heading">
      <style:text-properties officeooo:paragraph-rsid="00252fce"/>
    </style:style>
    <style:style style:name="P22" style:family="paragraph" style:parent-style-name="List_20_Heading" style:master-page-name="">
      <style:paragraph-properties style:page-number="auto" fo:keep-with-next="always"/>
    </style:style>
    <style:style style:name="P23" style:family="paragraph" style:parent-style-name="List_20_Heading" style:master-page-name="">
      <style:paragraph-properties style:page-number="auto" fo:keep-with-next="always"/>
    </style:style>
    <style:style style:name="P24" style:family="paragraph" style:parent-style-name="List_20_Heading" style:master-page-name="">
      <style:paragraph-properties style:page-number="auto" fo:keep-with-next="always"/>
    </style:style>
    <style:style style:name="P25" style:family="paragraph" style:parent-style-name="List_20_Heading">
      <style:text-properties officeooo:paragraph-rsid="002c3a23"/>
    </style:style>
    <style:style style:name="P26" style:family="paragraph" style:parent-style-name="Text_20_body" style:list-style-name="L1"/>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paragraph-properties fo:text-align="center" style:justify-single-word="false"/>
    </style:style>
    <style:style style:name="P29" style:family="paragraph" style:parent-style-name="Text_20_body">
      <style:text-properties officeooo:paragraph-rsid="00179028"/>
    </style:style>
    <style:style style:name="P30" style:family="paragraph" style:parent-style-name="Text_20_body">
      <style:paragraph-properties fo:margin-left="0.7874in" fo:text-indent="0in" style:auto-text-indent="false"/>
      <style:text-properties officeooo:paragraph-rsid="0019e490"/>
    </style:style>
    <style:style style:name="P31" style:family="paragraph" style:parent-style-name="Text_20_body">
      <style:text-properties officeooo:paragraph-rsid="001fdf7d"/>
    </style:style>
    <style:style style:name="P32" style:family="paragraph" style:parent-style-name="Text_20_body">
      <style:text-properties officeooo:rsid="002183d8" officeooo:paragraph-rsid="002183d8"/>
    </style:style>
    <style:style style:name="P33" style:family="paragraph" style:parent-style-name="Text_20_body">
      <style:text-properties officeooo:rsid="002183d8" officeooo:paragraph-rsid="00289ed2"/>
    </style:style>
    <style:style style:name="P34" style:family="paragraph" style:parent-style-name="Text_20_body">
      <style:text-properties officeooo:paragraph-rsid="002183d8"/>
    </style:style>
    <style:style style:name="P35" style:family="paragraph" style:parent-style-name="Text_20_body">
      <style:text-properties officeooo:paragraph-rsid="00252fce"/>
    </style:style>
    <style:style style:name="P36" style:family="paragraph" style:parent-style-name="Text_20_body">
      <style:text-properties officeooo:paragraph-rsid="00289ed2"/>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weight="bold" officeooo:rsid="0026a7fd" style:font-weight-asian="bold" style:font-weight-complex="bold"/>
    </style:style>
    <style:style style:name="T12" style:family="text">
      <style:text-properties fo:font-weight="bold" officeooo:rsid="002c3a23" style:font-weight-asian="bold"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15cd58" style:font-size-asian="18pt" style:font-weight-asian="bold" style:font-size-complex="18pt" style:font-weight-complex="bold"/>
    </style:style>
    <style:style style:name="T15" style:family="text">
      <style:text-properties fo:font-size="10pt" style:font-size-asian="10pt" style:font-size-complex="10pt"/>
    </style:style>
    <style:style style:name="T16" style:family="text">
      <style:text-properties fo:font-size="10pt" officeooo:rsid="000ff864" style:font-size-asian="10pt" style:font-size-complex="10pt"/>
    </style:style>
    <style:style style:name="T17" style:family="text">
      <style:text-properties fo:font-size="10pt" fo:font-style="italic" style:font-size-asian="10pt" style:font-size-complex="10pt"/>
    </style:style>
    <style:style style:name="T18" style:family="text">
      <style:text-properties fo:font-size="10pt" fo:font-style="italic" officeooo:rsid="000ff864"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officeooo:rsid="000ff864" style:font-size-asian="10pt" style:font-weight-asian="bold" style:font-size-complex="10pt" style:font-weight-complex="bold"/>
    </style:style>
    <style:style style:name="T21" style:family="text">
      <style:text-properties fo:font-size="10pt" fo:font-weight="bold" officeooo:rsid="0019e490" style:font-size-asian="10pt" style:font-weight-asian="bold" style:font-size-complex="10pt" style:font-weight-complex="bold"/>
    </style:style>
    <style:style style:name="T22" style:family="text">
      <style:text-properties officeooo:rsid="000e5adb"/>
    </style:style>
    <style:style style:name="T23" style:family="text">
      <style:text-properties officeooo:rsid="0018a80c"/>
    </style:style>
    <style:style style:name="T24" style:family="text">
      <style:text-properties style:font-name="Liberation Mono" fo:font-size="10pt" fo:font-weight="bold" officeooo:rsid="000ff864" style:font-size-asian="10pt" style:font-weight-asian="bold" style:font-size-complex="10pt" style:font-weight-complex="bold"/>
    </style:style>
    <style:style style:name="T25" style:family="text">
      <style:text-properties style:font-name="Liberation Serif1" fo:font-size="12pt" officeooo:rsid="000ff864" style:font-size-asian="12pt" style:font-size-complex="12pt"/>
    </style:style>
    <style:style style:name="T26" style:family="text">
      <style:text-properties style:font-name="Liberation Serif1" fo:font-size="12pt" officeooo:rsid="00112d41" style:font-size-asian="12pt" style:font-size-complex="12pt"/>
    </style:style>
    <style:style style:name="T27" style:family="text">
      <style:text-properties style:font-name="Liberation Serif1" fo:font-size="12pt" officeooo:rsid="0019e490" style:font-size-asian="12pt" style:font-size-complex="12pt"/>
    </style:style>
    <style:style style:name="T28" style:family="text">
      <style:text-properties officeooo:rsid="0019e490"/>
    </style:style>
    <style:style style:name="T29" style:family="text">
      <style:text-properties officeooo:rsid="001ac30b"/>
    </style:style>
    <style:style style:name="T30" style:family="text">
      <style:text-properties officeooo:rsid="001b11bc"/>
    </style:style>
    <style:style style:name="T31" style:family="text">
      <style:text-properties officeooo:rsid="001c6db8"/>
    </style:style>
    <style:style style:name="T32" style:family="text">
      <style:text-properties fo:font-weight="normal" officeooo:rsid="0026a7fd" style:font-weight-asian="normal" style:font-weight-complex="normal"/>
    </style:style>
    <style:style style:name="T33" style:family="text">
      <style:text-properties officeooo:rsid="001d2c91"/>
    </style:style>
    <style:style style:name="T34" style:family="text">
      <style:text-properties officeooo:rsid="001f0344"/>
    </style:style>
    <style:style style:name="T35" style:family="text">
      <style:text-properties style:font-name="Liberation Serif" style:font-name-asian="Liberation Serif" style:font-name-complex="Liberation Serif"/>
    </style:style>
    <style:style style:name="T36" style:family="text">
      <style:text-properties style:font-name="Liberation Serif" officeooo:rsid="001fdf7d" style:font-name-asian="Liberation Serif" style:font-name-complex="Liberation Serif"/>
    </style:style>
    <style:style style:name="T37" style:family="text">
      <style:text-properties style:font-name="Liberation Serif" fo:font-weight="bold" style:font-name-asian="Liberation Serif" style:font-weight-asian="bold" style:font-name-complex="Liberation Serif" style:font-weight-complex="bold"/>
    </style:style>
    <style:style style:name="T38" style:family="text">
      <style:text-properties style:font-name="Liberation Serif" fo:font-weight="bold" officeooo:rsid="00289ed2" style:font-name-asian="Liberation Serif" style:font-weight-asian="bold" style:font-name-complex="Liberation Serif" style:font-weight-complex="bold"/>
    </style:style>
    <style:style style:name="T39" style:family="text">
      <style:text-properties officeooo:rsid="0026a7fd"/>
    </style:style>
    <style:style style:name="T40" style:family="text">
      <style:text-properties officeooo:rsid="00289ed2"/>
    </style:style>
    <style:style style:name="T41" style:family="text">
      <style:text-properties officeooo:rsid="0017f44b"/>
    </style:style>
    <style:style style:name="T42" style:family="text">
      <style:text-properties officeooo:rsid="0029840a"/>
    </style:style>
    <style:style style:name="T43" style:family="text">
      <style:text-properties officeooo:rsid="002c3a2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4">Virtual </text:span><text:span text:style-name="T13">ASR33 Teletype</text:span><text:line-break/><text:date style:data-style-name="N41" text:date-value="2026-06-13T08:03:25.470954347">June 13,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9"><text:span text:style-name="T22">There are example “bash” scripts showing how to run the telnet and tty (serial port) variants. Serial ports require the external package jSerialComm, which is a submodule in git repository. </text:span>The general command<text:span text:style-name="T23">line </text:span>syntax is: </text:p>
      <text:h text:style-name="P7" text:outline-level="4"><text:bookmark-start text:name="__RefHeading___Toc6502_3940028066 Copy 1"/>Telnet version<text:bookmark-end text:name="__RefHeading___Toc6502_3940028066 Copy 1"/></text:h>
      <text:p text:style-name="P30"><text:span text:style-name="User_20_Entry"><text:span text:style-name="T20">j</text:span></text:span><text:span text:style-name="User_20_Entry"><text:span text:style-name="T19">ava -</text:span></text:span><text:span text:style-name="User_20_Entry"><text:span text:style-name="T20">jar </text:span></text:span><text:span text:style-name="User_20_Entry"><text:span text:style-name="T21">ASR33</text:span></text:span><text:span text:style-name="User_20_Entry"><text:span text:style-name="T20">telnet.jar</text:span></text:span><text:span text:style-name="User_20_Entry"><text:span text:style-name="T15"> [</text:span></text:span><text:span text:style-name="User_20_Entry"><text:span text:style-name="T17">prop</text:span></text:span><text:span text:style-name="User_20_Entry"><text:span text:style-name="T15">=</text:span></text:span><text:span text:style-name="User_20_Entry"><text:span text:style-name="T17">value</text:span></text:span><text:span text:style-name="User_20_Entry"><text:span text:style-name="T15">...] [</text:span></text:span><text:span text:style-name="User_20_Entry"><text:span text:style-name="T17">host</text:span></text:span><text:span text:style-name="User_20_Entry"><text:span text:style-name="T15"> </text:span></text:span><text:span text:style-name="User_20_Entry"><text:span text:style-name="T17">port</text:span></text:span><text:span text:style-name="User_20_Entry"><text:span text:style-name="T15">]</text:span></text:span> </text:p>
      <text:h text:style-name="P7" text:outline-level="4"><text:bookmark-start text:name="__RefHeading___Toc6504_3940028066 Copy 1"/>T<text:span text:style-name="T22">ty</text:span> version<text:bookmark-end text:name="__RefHeading___Toc6504_3940028066 Copy 1"/></text:h>
      <text:p text:style-name="P30"><text:line-break/><text:span text:style-name="T24">j</text:span><text:span text:style-name="User_20_Entry"><text:span text:style-name="T19">ava -</text:span></text:span><text:span text:style-name="User_20_Entry"><text:span text:style-name="T20">cp ${JARS} </text:span></text:span><text:span text:style-name="User_20_Entry"><text:span text:style-name="T21">ASR33</text:span></text:span><text:span text:style-name="User_20_Entry"><text:span text:style-name="T20">tty</text:span></text:span><text:span text:style-name="User_20_Entry"><text:span text:style-name="T15"> [</text:span></text:span><text:span text:style-name="User_20_Entry"><text:span text:style-name="T17">prop</text:span></text:span><text:span text:style-name="User_20_Entry"><text:span text:style-name="T15">=</text:span></text:span><text:span text:style-name="User_20_Entry"><text:span text:style-name="T17">value</text:span></text:span><text:span text:style-name="User_20_Entry"><text:span text:style-name="T15">...] [</text:span></text:span><text:span text:style-name="User_20_Entry"><text:span text:style-name="T16">t</text:span></text:span><text:span text:style-name="User_20_Entry"><text:span text:style-name="T18">ty</text:span></text:span><text:span text:style-name="User_20_Entry"><text:span text:style-name="T15"> </text:span></text:span><text:span text:style-name="User_20_Entry"><text:span text:style-name="T16">b</text:span></text:span><text:span text:style-name="User_20_Entry"><text:span text:style-name="T18">aud</text:span></text:span><text:span text:style-name="User_20_Entry"><text:span text:style-name="T15">]</text:span></text:span></text:p>
      <text:p text:style-name="P30"><text:span text:style-name="User_20_Entry"><text:span text:style-name="T25">Where “${JARS}” </text:span></text:span><text:span text:style-name="User_20_Entry"><text:span text:style-name="T26">here</text:span></text:span><text:span text:style-name="User_20_Entry"><text:span text:style-name="T25"> represents the paths to the jar files required to run, </text:span></text:span><text:span text:style-name="User_20_Entry"><text:span text:style-name="T26">specifically</text:span></text:span><text:span text:style-name="User_20_Entry"><text:span text:style-name="T25"> </text:span></text:span><text:span text:style-name="User_20_Entry"><text:span text:style-name="T27">ASR33</text:span></text:span><text:span text:style-name="User_20_Entry"><text:span text:style-name="T25">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6">►</text:span><text:span text:style-name="T6">Punch</text:span> selects a file to use for the paper tape punch. Any previous content is lost. Clicking "Cancel" leaves no file selected (punch not operational). Editing (backspacing, <text:span text:style-name="T28">the B.SP. button</text:span>) is not supported. </text:p>
      <text:p text:style-name="P31">The menu item <text:span text:style-name="T6">PTape</text:span><text:span text:style-name="T36">►</text:span><text:span text:style-name="T6">Reader</text:span> selects a file to use for the paper tape reader. In order to re-wind a file, re-select it from this menu.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8">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9">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span text:style-name="T40">Pressing this button while the reader is active will stop the reader.</text:span></text:p>
      <text:p text:style-name="P31">The menu item <text:span text:style-name="T6">PTape</text:span><text:span text:style-name="T36">►</text:span><text:span text:style-name="T6">Rdr_Position</text:span> will pop-up <text:span text:style-name="T40">a</text:span> window allowing positioning of the paper tape in the reader. The reader is disabled during this operation <text:span text:style-name="T29">(same as being in the FREE position)</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9">Note that the beginning of the tape is “down” </text:span><text:span text:style-name="T39">in the view, and the keys/actions are moving the *tape*, not the view</text:span><text:span text:style-name="T29">.</text:span> Press <text:span text:style-name="T6">E</text:span><text:span text:style-name="T11">nter</text:span> or Close the window to set the new position and release the reader. <text:span text:style-name="T39">Press </text:span><text:span text:style-name="T11">Delete</text:span><text:span text:style-name="T32"> to cancel without changing position.</text:span></text:p>
      <text:p text:style-name="P36">The menu item <text:span text:style-name="T6">PTape</text:span><text:span text:style-name="T36">►</text:span><text:span text:style-name="T38">Pun_Viewer</text:span> will pop-up <text:span text:style-name="T40">a</text:span> window allowing <text:span text:style-name="T40">viewing</text:span> of the paper tape in the <text:span text:style-name="T40">punch</text:span>. <text:span text:style-name="T42">The contents is a snapshot at the point the window is opened (data punched later does not appear in the window).</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9">Note that the beginning of the tape is “down” </text:span><text:span text:style-name="T39">in the view, and the keys/actions are moving the *tape*, not the view</text:span><text:span text:style-name="T29">.</text:span> Press <text:span text:style-name="T6">E</text:span><text:span text:style-name="T11">nter</text:span><text:span text:style-name="T32">,</text:span> <text:span text:style-name="T11">Delete</text:span> or Close the window. <text:span text:style-name="T40">The position of tape in the punch is never changed</text:span><text:span text:style-name="T32">.</text:span></text:p>
      <text:p text:style-name="P33">The menu item <text:span text:style-name="T6">Print</text:span><text:span text:style-name="T36">►</text:span><text:span text:style-name="T37">Tear_Off</text:span><text:span text:style-name="T35"> will discard all text currently “printed”, clearing the window.</text:span></text:p>
      <text:p text:style-name="P32">The menu item <text:span text:style-name="T6">Print</text:span><text:span text:style-name="T36">►</text:span><text:span text:style-name="T37">Save</text:span><text:span text:style-name="T35"> allows saving all text currently “printed” to a file.</text:span></text:p>
      <text:p text:style-name="P32"><text:span text:style-name="T35">A scroll bar on the right side allows looking back in currently “printed” text. There is currently no way to view/monitor paper tape being punched, nor is there a “live view” of the paper tape reader.</text:span></text:p>
      <text:h text:style-name="Heading_20_4" text:outline-level="4"><text:bookmark-start text:name="__RefHeading___Toc6525_3940028066"/>Keyboard<text:bookmark-end text:name="__RefHeading___Toc6525_3940028066"/></text:h>
      <text:p text:style-name="Text_20_body">F12 functions as the HERE IS key. The answer-back drum defaults to <text:span text:style-name="T29">20</text:span> NUL characters <text:span text:style-name="T29">(often used to make blank leader/trailer on punched paper tape)</text:span>, but may be set to a string using the "ansbak" property (20 characters maximum). </text:p>
      <text:p text:style-name="Text_20_body">The Enter key produces CR, use Ctrl-J <text:span text:style-name="T30">or Ctrl-Enter </text:span>for LF. </text:p>
      <text:p text:style-name="Text_20_body"><text:soft-page-break/>All characters in the last ASCII-7 bank (lower case letters, etc) except DEL (0x7f) are folded into the upper-case bank. </text:p>
      <text:p text:style-name="Text_20_body">The Delete key produces the RUBOUT character 0x7f. </text:p>
      <text:p text:style-name="P31">The menu item <text:span text:style-name="T6">Print</text:span><text:span text:style-name="T36">►</text:span><text:span text:style-name="T6">Copy</text:span> (also Alt-C) will copy any selected text (the usual mouse click-drag) to the clipboard. </text:p>
      <text:p text:style-name="P31">The menu item <text:span text:style-name="T6">Print</text:span><text:span text:style-name="T36">►</text:span><text:span text:style-name="T6">Paste</text:span> (also Alt-V or middle mouse button) will paste text from the clipboard as keyboard input. <text:span text:style-name="T30">This does not paste text to the “printed page”.</text:span> </text:p>
      <text:h text:style-name="Heading_20_4" text:outline-level="4"><text:bookmark-start text:name="__RefHeading___Toc6527_3940028066"/>Misc<text:bookmark-end text:name="__RefHeading___Toc6527_3940028066"/></text:h>
      <text:p text:style-name="Text_20_body">Two modes are possible for the telnet version, "server" or client <text:span text:style-name="T30">(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30">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34">(client) If the connection to the remote is lost or not present to begin with, the menu item <text:span text:style-name="T6">Print</text:span><text:span text:style-name="T36">►</text:span><text:span text:style-name="T6">Reconnect</text:span> may be used to attempt to re-connect to the remote using the same host and port. </text:p>
      <text:p text:style-name="P34">(client) A new, different, connection may be specified using the <text:span text:style-name="T6">Print</text:span><text:span text:style-name="T36">►</text:span><text:span text:style-name="T6">New_Connection</text:span> menu item. </text:p>
      <text:p text:style-name="P34">The current connection may be dropped using the <text:span text:style-name="T6">Print</text:span><text:span text:style-name="T36">►</text:span><text:span text:style-name="T6">Hangup</text:span> menu item. </text:p>
      <text:h text:style-name="P8" text:outline-level="4"><text:bookmark-start text:name="__RefHeading___Toc6504_3940028066"/>T<text:span text:style-name="T22">ty</text:span> version<text:bookmark-end text:name="__RefHeading___Toc6504_3940028066"/></text:h>
      <text:p text:style-name="P35">The menu item <text:span text:style-name="T6">Screen</text:span><text:span text:style-name="T36">►</text:span><text:span text:style-name="T6">New_Connection</text:span> will prompt for a new <text:span text:style-name="T22">tty</text:span> and <text:span text:style-name="T22">baud</text:span> and <text:span text:style-name="T22">then </text:span>attempt to <text:span text:style-name="T22">close and</text:span> <text:span text:style-name="T22">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30">Boolean properties do not require a value, but do require a “=” when used on the commandline.</text:span></text:p>
      <text:p text:style-name="Text_20_body">The terminal will search for properties in the following order: </text:p>
      <text:list text:style-name="L1">
        <text:list-item>
          <text:p text:style-name="P27"><text:span text:style-name="T1">prop</text:span>=<text:span text:style-name="T1">value</text:span> arguments on the commandline </text:p>
        </text:list-item>
        <text:list-item>
          <text:p text:style-name="P27">Using the environment variable ASR33_CONFIG </text:p>
        </text:list-item>
        <text:list-item>
          <text:p text:style-name="P27">Looking for "asr33.rc" in the current directory </text:p>
        </text:list-item>
        <text:list-item>
          <text:p text:style-name="P26">Looking for ".asr33rc" in the user's home directory </text:p>
        </text:list-item>
      </text:list>
      <text:p text:style-name="Text_20_body">Only one properties file will be used - they are not combined. <text:span text:style-name="T30">Commandline properties will override (or supplement) whichever properties file was loaded.</text:span></text:p>
      <text:p text:style-name="P22"><text:soft-page-break/><text:span text:style-name="T6">asr33_ansbak</text:span><text:span text:style-name="T8">=</text:span><text:span text:style-name="T2">string</text:span> </text:p>
      <text:p text:style-name="P12">Specifies a string to use for the Answer-back drum. Typically, this drum generate<text:span text:style-name="T30">s 20</text:span> NUL characters, and that is the default. A maximum of 20 characters is used, with the remaining positions on the drum being left as <text:span text:style-name="T30">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30">This does not affect typing from the keyboard.</text:span></text:p>
      <text:p text:style-name="P19"><text:span text:style-name="T6">asr33_</text:span><text:span text:style-name="T8">cr_</text:span><text:span text:style-name="T6">delay</text:span><text:span text:style-name="T8">=</text:span><text:span text:style-name="T2">ms</text:span></text:p>
      <text:p text:style-name="P10">The delay inserted after each <text:span text:style-name="T30">CR</text:span> is pasted or otherwise automatically sent to the host, in milliseconds. Default is 10<text:span text:style-name="T30">0</text:span>0. <text:span text:style-name="T30">This does not affect typing CR from the keyboard.</text:span></text:p>
      <text:p text:style-name="P18"><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31">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3">Specifies the size of the font <text:span text:style-name="T31">(in points)</text:span> to use. Default is 12. Minimum is 4 and maximum is 30.</text:p>
      <text:p text:style-name="P21"><text:span text:style-name="T6">asr33_</text:span><text:span text:style-name="T10">live_ppt</text:span></text:p>
      <text:p text:style-name="P14">Enables a “live view” of the <text:span text:style-name="T42">punched </text:span>paper tape <text:span text:style-name="T42">devices (</text:span>reader and punch<text:span text:style-name="T42">)</text:span>. The views are fixed windows showing only the most-recently punched data or reader data before/after the next character to read.</text:p>
      <text:h text:style-name="P5" text:outline-level="3"><text:bookmark-start text:name="__RefHeading___Toc6533_3940028066"/><text:span text:style-name="T34">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text:span text:style-name="T43">74</text:span>.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P22"><text:soft-page-break/><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22"><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17">Used to disable the margin bell after column 72. Default is enabled. </text:p>
      <text:p text:style-name="P25"><text:span text:style-name="T6">asr33_</text:span><text:span text:style-name="T12">eol</text:span><text:span text:style-name="T6">_bell</text:span> </text:p>
      <text:p text:style-name="P16">Used to disable the <text:span text:style-name="T43">end of line</text:span> bell after column 7<text:span text:style-name="T43">4</text:span>. Default is enabled. </text:p>
      <text:h text:style-name="P6"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9">Sets server mode, where the ASR33 listens on the specified host and port, simulating a standalone case where the ASR33 waits for connections from remote ASR33s. Value is ignored, but <text:span text:style-name="T42">the p</text:span><text:span text:style-name="T31">roperty must be absent to turn off.</text:span></text:p>
      <text:h text:style-name="P4" text:outline-level="3"><text:bookmark-start text:name="__RefHeading___Toc6535_3940028066 Copy 1"/><text:span text:style-name="T33">Tty</text:span> Properties<text:bookmark-end text:name="__RefHeading___Toc6535_3940028066 Copy 1"/></text:h>
      <text:p text:style-name="P20"><text:span text:style-name="T6">asr33_</text:span><text:span text:style-name="T9">tty</text:span><text:span text:style-name="T7">=</text:span><text:span text:style-name="T4">device</text:span></text:p>
      <text:p text:style-name="P11">The <text:span text:style-name="T33">device path of the serial port</text:span> to connect to. This is the same as the first non-property argument on the command line. </text:p>
      <text:p text:style-name="P20"><text:span text:style-name="T6">asr33_</text:span><text:span text:style-name="T9">baud</text:span><text:span text:style-name="T7">=</text:span><text:span text:style-name="T4">speed</text:span></text:p>
      <text:p text:style-name="P15">The <text:span text:style-name="T33">speed (baud) to use on the selected serial port</text:span>. This is the same as the second non-property argument on the command line. <text:span text:style-name="T41">Default is 9600.</text:span></text:p>
      <text:p text:style-name="P20"><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13T08:03:25.419173898</dc:date>
    <meta:editing-duration>P4DT17H19M1S</meta:editing-duration>
    <meta:editing-cycles>15</meta:editing-cycles>
    <meta:generator>LibreOffice/24.2.7.2$Linux_X86_64 LibreOffice_project/420$Build-2</meta:generator>
    <meta:print-date>2026-06-11T06:28:56.946362539</meta:print-date>
    <meta:printed-by>PDF files</meta:printed-by>
    <meta:document-statistic meta:table-count="0" meta:image-count="0" meta:object-count="0" meta:page-count="5" meta:paragraph-count="113" meta:word-count="1746" meta:character-count="10652" meta:non-whitespace-character-count="8967"/>
  </office:meta>
</office:document-meta>
</file>