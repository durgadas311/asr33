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183d8"/>
    </style:style>
    <style:style style:name="P6" style:family="paragraph" style:parent-style-name="Heading_20_4">
      <style:text-properties officeooo:paragraph-rsid="0019e490"/>
    </style:style>
    <style:style style:name="P7" style:family="paragraph" style:parent-style-name="List_20_Contents">
      <style:paragraph-properties fo:margin-top="0in" fo:margin-bottom="0.1965in" style:contextual-spacing="false"/>
    </style:style>
    <style:style style:name="P8" style:family="paragraph" style:parent-style-name="List_20_Contents">
      <style:text-properties officeooo:paragraph-rsid="001b11bc"/>
    </style:style>
    <style:style style:name="P9" style:family="paragraph" style:parent-style-name="List_20_Contents">
      <style:text-properties officeooo:paragraph-rsid="001d2c91"/>
    </style:style>
    <style:style style:name="P10" style:family="paragraph" style:parent-style-name="List_20_Contents">
      <style:text-properties officeooo:paragraph-rsid="00241417"/>
    </style:style>
    <style:style style:name="P11" style:family="paragraph" style:parent-style-name="List_20_Heading">
      <style:text-properties officeooo:paragraph-rsid="001b11bc"/>
    </style:style>
    <style:style style:name="P12" style:family="paragraph" style:parent-style-name="List_20_Heading">
      <style:text-properties officeooo:paragraph-rsid="001d2c91"/>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paragraph-properties fo:text-align="center" style:justify-single-word="false"/>
    </style:style>
    <style:style style:name="P16" style:family="paragraph" style:parent-style-name="Text_20_body">
      <style:text-properties officeooo:paragraph-rsid="00179028"/>
    </style:style>
    <style:style style:name="P17" style:family="paragraph" style:parent-style-name="Text_20_body">
      <style:paragraph-properties fo:margin-left="0.7874in" fo:text-indent="0in" style:auto-text-indent="false"/>
      <style:text-properties officeooo:paragraph-rsid="0019e490"/>
    </style:style>
    <style:style style:name="P18" style:family="paragraph" style:parent-style-name="Text_20_body">
      <style:text-properties officeooo:paragraph-rsid="001fdf7d"/>
    </style:style>
    <style:style style:name="P19" style:family="paragraph" style:parent-style-name="Text_20_body">
      <style:text-properties officeooo:rsid="002183d8" officeooo:paragraph-rsid="002183d8"/>
    </style:style>
    <style:style style:name="P20" style:family="paragraph" style:parent-style-name="Text_20_body">
      <style:text-properties officeooo:paragraph-rsid="002183d8"/>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bold" officeooo:rsid="0015cd58" style:font-size-asian="18pt" style:font-weight-asian="bold" style:font-size-complex="18pt" style:font-weight-complex="bold"/>
    </style:style>
    <style:style style:name="T12" style:family="text">
      <style:text-properties fo:font-size="10pt" style:font-size-asian="10pt" style:font-size-complex="10pt"/>
    </style:style>
    <style:style style:name="T13" style:family="text">
      <style:text-properties fo:font-size="10pt" officeooo:rsid="000ff864" style:font-size-asian="10pt" style:font-size-complex="10pt"/>
    </style:style>
    <style:style style:name="T14" style:family="text">
      <style:text-properties fo:font-size="10pt" fo:font-style="italic" style:font-size-asian="10pt" style:font-size-complex="10pt"/>
    </style:style>
    <style:style style:name="T15" style:family="text">
      <style:text-properties fo:font-size="10pt" fo:font-style="italic" officeooo:rsid="000ff864"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bold" officeooo:rsid="000ff864" style:font-size-asian="10pt" style:font-weight-asian="bold" style:font-size-complex="10pt" style:font-weight-complex="bold"/>
    </style:style>
    <style:style style:name="T18" style:family="text">
      <style:text-properties fo:font-size="10pt" fo:font-weight="bold" officeooo:rsid="0019e490" style:font-size-asian="10pt" style:font-weight-asian="bold" style:font-size-complex="10pt" style:font-weight-complex="bold"/>
    </style:style>
    <style:style style:name="T19" style:family="text">
      <style:text-properties officeooo:rsid="000e5adb"/>
    </style:style>
    <style:style style:name="T20" style:family="text">
      <style:text-properties officeooo:rsid="0018a80c"/>
    </style:style>
    <style:style style:name="T21" style:family="text">
      <style:text-properties style:font-name="Liberation Mono" fo:font-size="10pt" fo:font-weight="bold" officeooo:rsid="000ff864" style:font-size-asian="10pt" style:font-weight-asian="bold" style:font-size-complex="10pt" style:font-weight-complex="bold"/>
    </style:style>
    <style:style style:name="T22" style:family="text">
      <style:text-properties style:font-name="Liberation Serif1" fo:font-size="12pt" officeooo:rsid="000ff864" style:font-size-asian="12pt" style:font-size-complex="12pt"/>
    </style:style>
    <style:style style:name="T23" style:family="text">
      <style:text-properties style:font-name="Liberation Serif1" fo:font-size="12pt" officeooo:rsid="00112d41" style:font-size-asian="12pt" style:font-size-complex="12pt"/>
    </style:style>
    <style:style style:name="T24" style:family="text">
      <style:text-properties style:font-name="Liberation Serif1" fo:font-size="12pt" officeooo:rsid="0019e490" style:font-size-asian="12pt" style:font-size-complex="12pt"/>
    </style:style>
    <style:style style:name="T25" style:family="text">
      <style:text-properties officeooo:rsid="0019e490"/>
    </style:style>
    <style:style style:name="T26" style:family="text">
      <style:text-properties officeooo:rsid="001ac30b"/>
    </style:style>
    <style:style style:name="T27" style:family="text">
      <style:text-properties officeooo:rsid="001b11bc"/>
    </style:style>
    <style:style style:name="T28" style:family="text">
      <style:text-properties officeooo:rsid="001c6db8"/>
    </style:style>
    <style:style style:name="T29" style:family="text">
      <style:text-properties officeooo:rsid="001d2c91"/>
    </style:style>
    <style:style style:name="T30" style:family="text">
      <style:text-properties officeooo:rsid="001f0344"/>
    </style:style>
    <style:style style:name="T31" style:family="text">
      <style:text-properties style:font-name="Liberation Serif" style:font-name-asian="Liberation Serif" style:font-name-complex="Liberation Serif"/>
    </style:style>
    <style:style style:name="T32" style:family="text">
      <style:text-properties style:font-name="Liberation Serif" officeooo:rsid="001fdf7d" style:font-name-asian="Liberation Serif" style:font-name-complex="Liberation Serif"/>
    </style:style>
    <style:style style:name="T33" style:family="text">
      <style:text-properties style:font-name="Liberation Serif" fo:font-weight="bold" style:font-name-asian="Liberation Serif" style:font-weight-asian="bold" style:font-name-complex="Liberation Serif"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1">Virtual </text:span><text:span text:style-name="T10">ASR33 Teletype</text:span><text:line-break/><text:date style:data-style-name="N41" text:date-value="2026-06-08T15:09:05.488717337">June 8,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2"><text:a xlink:type="simple" xlink:href="#__RefHeading___Toc6525_3940028066" text:style-name="Index_20_Link" text:visited-style-name="Index_20_Link">Keyboard<text:tab/>2</text:a></text:p>
          <text:p text:style-name="P2"><text:a xlink:type="simple" xlink:href="#__RefHeading___Toc6527_3940028066" text:style-name="Index_20_Link" text:visited-style-name="Index_20_Link">Misc<text:tab/>2</text:a></text:p>
          <text:p text:style-name="P2"><text:a xlink:type="simple" xlink:href="#__RefHeading___Toc6529_3940028066" text:style-name="Index_20_Link" text:visited-style-name="Index_20_Link">Telnet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4</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16"><text:span text:style-name="T19">There are example “bash” scripts showing how to run the telnet and tty (serial port) variants. Serial ports require the external package jSerialComm, which is a submodule in git repository. </text:span>The general command<text:span text:style-name="T20">line </text:span>syntax is: </text:p>
      <text:h text:style-name="P6" text:outline-level="4"><text:bookmark-start text:name="__RefHeading___Toc6502_3940028066 Copy 1"/>Telnet version<text:bookmark-end text:name="__RefHeading___Toc6502_3940028066 Copy 1"/></text:h>
      <text:p text:style-name="P17"><text:span text:style-name="User_20_Entry"><text:span text:style-name="T17">j</text:span></text:span><text:span text:style-name="User_20_Entry"><text:span text:style-name="T16">ava -</text:span></text:span><text:span text:style-name="User_20_Entry"><text:span text:style-name="T17">jar </text:span></text:span><text:span text:style-name="User_20_Entry"><text:span text:style-name="T18">ASR33</text:span></text:span><text:span text:style-name="User_20_Entry"><text:span text:style-name="T17">telnet.jar</text:span></text:span><text:span text:style-name="User_20_Entry"><text:span text:style-name="T12"> [</text:span></text:span><text:span text:style-name="User_20_Entry"><text:span text:style-name="T14">prop</text:span></text:span><text:span text:style-name="User_20_Entry"><text:span text:style-name="T12">=</text:span></text:span><text:span text:style-name="User_20_Entry"><text:span text:style-name="T14">value</text:span></text:span><text:span text:style-name="User_20_Entry"><text:span text:style-name="T12">...] [</text:span></text:span><text:span text:style-name="User_20_Entry"><text:span text:style-name="T14">host</text:span></text:span><text:span text:style-name="User_20_Entry"><text:span text:style-name="T12"> </text:span></text:span><text:span text:style-name="User_20_Entry"><text:span text:style-name="T14">port</text:span></text:span><text:span text:style-name="User_20_Entry"><text:span text:style-name="T12">]</text:span></text:span> </text:p>
      <text:h text:style-name="P6" text:outline-level="4"><text:bookmark-start text:name="__RefHeading___Toc6504_3940028066 Copy 1"/>T<text:span text:style-name="T19">ty</text:span> version<text:bookmark-end text:name="__RefHeading___Toc6504_3940028066 Copy 1"/></text:h>
      <text:p text:style-name="P17"><text:line-break/><text:span text:style-name="T21">j</text:span><text:span text:style-name="User_20_Entry"><text:span text:style-name="T16">ava -</text:span></text:span><text:span text:style-name="User_20_Entry"><text:span text:style-name="T17">cp ${JARS} </text:span></text:span><text:span text:style-name="User_20_Entry"><text:span text:style-name="T18">ASR33</text:span></text:span><text:span text:style-name="User_20_Entry"><text:span text:style-name="T17">tty</text:span></text:span><text:span text:style-name="User_20_Entry"><text:span text:style-name="T12"> [</text:span></text:span><text:span text:style-name="User_20_Entry"><text:span text:style-name="T14">prop</text:span></text:span><text:span text:style-name="User_20_Entry"><text:span text:style-name="T12">=</text:span></text:span><text:span text:style-name="User_20_Entry"><text:span text:style-name="T14">value</text:span></text:span><text:span text:style-name="User_20_Entry"><text:span text:style-name="T12">...] [</text:span></text:span><text:span text:style-name="User_20_Entry"><text:span text:style-name="T13">t</text:span></text:span><text:span text:style-name="User_20_Entry"><text:span text:style-name="T15">ty</text:span></text:span><text:span text:style-name="User_20_Entry"><text:span text:style-name="T12"> </text:span></text:span><text:span text:style-name="User_20_Entry"><text:span text:style-name="T13">b</text:span></text:span><text:span text:style-name="User_20_Entry"><text:span text:style-name="T15">aud</text:span></text:span><text:span text:style-name="User_20_Entry"><text:span text:style-name="T12">]</text:span></text:span></text:p>
      <text:p text:style-name="P17"><text:span text:style-name="User_20_Entry"><text:span text:style-name="T22">Where “${JARS}” </text:span></text:span><text:span text:style-name="User_20_Entry"><text:span text:style-name="T23">here</text:span></text:span><text:span text:style-name="User_20_Entry"><text:span text:style-name="T22"> represents the paths to the jar files required to run, </text:span></text:span><text:span text:style-name="User_20_Entry"><text:span text:style-name="T23">specifically</text:span></text:span><text:span text:style-name="User_20_Entry"><text:span text:style-name="T22"> </text:span></text:span><text:span text:style-name="User_20_Entry"><text:span text:style-name="T24">ASR33</text:span></text:span><text:span text:style-name="User_20_Entry"><text:span text:style-name="T22">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2">►</text:span><text:span text:style-name="T6">Punch</text:span> selects a file to use for the paper tape punch. Any previous content is lost. Clicking "Cancel" leaves no file selected (punch not operational). Editing (backspacing, <text:span text:style-name="T25">the B.SP. button</text:span>) is not supported. </text:p>
      <text:p text:style-name="P18">The menu item <text:span text:style-name="T6">PTape</text:span><text:span text:style-name="T32">►</text:span><text:span text:style-name="T6">Reader</text:span> selects a file to use for the paper tape reader. In order to re-wind a file, re-select it from this menu. Clicking "Cancel" leaves no file selected (reader not operational). </text:p>
      <text:p text:style-name="Text_20_body">LOCAL checkbox selects between LOCAL (checked) or LINE (unchecked) mode of operation. In LOCAL mode all characters from the remote are dropped and keys pressed are not sent to the remote but rather printed locally. </text:p>
      <text:p text:style-name="Text_20_body"><text:soft-page-break/>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5">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6">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p>
      <text:p text:style-name="P18">The menu item <text:span text:style-name="T6">PTape</text:span><text:span text:style-name="T32">►</text:span><text:span text:style-name="T6">Rdr_Position</text:span> will pop-up with window allowing positioning of the paper tape in the reader. The reader is disabled during this operation <text:span text:style-name="T26">(same as being in the FREE position)</text:span>. The keys UP, DOWN, PAGE_UP, and PAGE_DOWN, along with the mouse wheel, will reposition the tape. HOME jumps to the beginning, and END jumps to the end. <text:span text:style-name="T26">Note that the beginning of the tape is “down”.</text:span> Press ENTER or Close the window to set the new position and release the reader. </text:p>
      <text:p text:style-name="P19">The menu item <text:span text:style-name="T6">Print</text:span><text:span text:style-name="T32">►</text:span><text:span text:style-name="T33">Tear_Off</text:span><text:span text:style-name="T31"> will discard all text currently “printed”, clearing the window.</text:span></text:p>
      <text:p text:style-name="P19">The menu item <text:span text:style-name="T6">Print</text:span><text:span text:style-name="T32">►</text:span><text:span text:style-name="T33">Save</text:span><text:span text:style-name="T31"> allows saving all text currently “printed” to a file.</text:span></text:p>
      <text:p text:style-name="P19"><text:span text:style-name="T31">A scroll bar on the right side allows looking back in currently “printed” text. There is currently no way to view/monitor paper tape being punched, nor is there a “live view” of the paper tape reader.</text:span></text:p>
      <text:h text:style-name="P5" text:outline-level="3"><text:bookmark-start text:name="__RefHeading___Toc6525_3940028066"/>Keyboard<text:bookmark-end text:name="__RefHeading___Toc6525_3940028066"/></text:h>
      <text:p text:style-name="Text_20_body">F12 functions as the HERE IS key. The answer-back drum defaults to <text:span text:style-name="T26">20</text:span> NUL characters <text:span text:style-name="T26">(often used to make blank leader/trailer on punched paper tape)</text:span>, but may be set to a string using the "ansbak" property (20 characters maximum). </text:p>
      <text:p text:style-name="Text_20_body">The Enter key produces CR, use Ctrl-J <text:span text:style-name="T27">or Ctrl-Enter </text:span>for LF. </text:p>
      <text:p text:style-name="Text_20_body">All characters in the last ASCII-7 bank (lower case letters, etc) except DEL (0x7f) are folded into the upper-case bank. </text:p>
      <text:p text:style-name="Text_20_body">The Delete key produces the RUBOUT character 0x7f. </text:p>
      <text:p text:style-name="P18">The menu item <text:span text:style-name="T6">Print</text:span><text:span text:style-name="T32">►</text:span><text:span text:style-name="T6">Copy</text:span> (also Alt-C) will copy any selected text (the usual mouse click-drag) to the clipboard. </text:p>
      <text:p text:style-name="P18">The menu item <text:span text:style-name="T6">Print</text:span><text:span text:style-name="T32">►</text:span><text:span text:style-name="T6">Paste</text:span> (also Alt-V or middle mouse button) will paste text from the clipboard as keyboard input. <text:span text:style-name="T27">This does not paste text to the “printed page”.</text:span> </text:p>
      <text:h text:style-name="Heading_20_3" text:outline-level="3"><text:bookmark-start text:name="__RefHeading___Toc6527_3940028066"/>Misc<text:bookmark-end text:name="__RefHeading___Toc6527_3940028066"/></text:h>
      <text:p text:style-name="Text_20_body">Two modes are possible for the telnet version, "server" or client <text:span text:style-name="T27">(default)</text:span>. </text:p>
      <text:p text:style-name="Text_20_body"><text:soft-page-break/>Characters transmitted for the Reader or HERE IS function, or pasted into the window, are delayed according to the "delay" property, the number of milliseconds to delay after each character. Default is 100 milliseconds. <text:span text:style-name="T27">The CR may incur a different delay according to the “cr_delay” property. Default CR delay is 1000 milliseconds.</text:span></text:p>
      <text:p text:style-name="Text_20_body">Pasted text being transmitted may be canceled by pressing the F1 key. </text:p>
      <text:h text:style-name="Heading_20_3" text:outline-level="3"><text:bookmark-start text:name="__RefHeading___Toc6529_3940028066"/>Telnet version<text:bookmark-end text:name="__RefHeading___Toc6529_3940028066"/></text:h>
      <text:p text:style-name="P20">(client) If the connection to the remote is lost or not present to begin with, the menu item <text:span text:style-name="T6">Print</text:span><text:span text:style-name="T32">►</text:span><text:span text:style-name="T6">Reconnect</text:span> may be used to attempt to re-connect to the remote using the same host and port. </text:p>
      <text:p text:style-name="P20">(client) A new, different, connection may be specified using the <text:span text:style-name="T6">Print</text:span><text:span text:style-name="T32">►</text:span><text:span text:style-name="T6">New_Connection</text:span> menu item. </text:p>
      <text:p text:style-name="P20">The current connection may be dropped using the <text:span text:style-name="T6">Print</text:span><text:span text:style-name="T32">►</text:span><text:span text:style-name="T6">Hangup</text:span> menu item. </text:p>
      <text:p text:style-name="Text_20_body"/>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27">Boolean properties do not require a value, but do require a “=” when used on the commandline.</text:span></text:p>
      <text:p text:style-name="Text_20_body">The terminal will search for properties in the following order: </text:p>
      <text:list text:style-name="L1">
        <text:list-item>
          <text:p text:style-name="P14"><text:span text:style-name="T1">prop</text:span>=<text:span text:style-name="T1">value</text:span> arguments on the commandline </text:p>
        </text:list-item>
        <text:list-item>
          <text:p text:style-name="P14">Using the environment variable ASR33_CONFIG </text:p>
        </text:list-item>
        <text:list-item>
          <text:p text:style-name="P14">Looking for "asr33.rc" in the current directory </text:p>
        </text:list-item>
        <text:list-item>
          <text:p text:style-name="P13">Looking for ".asr33rc" in the user's home directory </text:p>
        </text:list-item>
      </text:list>
      <text:p text:style-name="Text_20_body">Only one properties file will be used - they are not combined. <text:span text:style-name="T27">Commandline properties will override (or supplement) whichever properties file was loaded.</text:span></text:p>
      <text:p text:style-name="List_20_Heading"><text:span text:style-name="T6">asr33_ansbak</text:span><text:span text:style-name="T8">=</text:span><text:span text:style-name="T2">string</text:span> </text:p>
      <text:p text:style-name="P10">Specifies a string to use for the Answer-back drum. Typically, this drum generate<text:span text:style-name="T27">s 20</text:span> NUL characters, and that is the default. A maximum of 20 characters is used, with the remaining positions on the drum being left as <text:span text:style-name="T27">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27">This does not affect typing from the keyboard.</text:span></text:p>
      <text:p text:style-name="P11"><text:span text:style-name="T6">asr33_</text:span><text:span text:style-name="T8">cr_</text:span><text:span text:style-name="T6">delay</text:span><text:span text:style-name="T8">=</text:span><text:span text:style-name="T2">ms</text:span></text:p>
      <text:p text:style-name="P8">The delay inserted after each <text:span text:style-name="T27">CR</text:span> is pasted or otherwise automatically sent to the host, in milliseconds. Default is 10<text:span text:style-name="T27">0</text:span>0. <text:span text:style-name="T27">This does not affect typing CR from the keyboard.</text:span></text:p>
      <text:p text:style-name="P11"><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text:soft-page-break/>(e.g. MDS-800) to trigger the reader advance. Default is 0x0f (Ctrl-O). <text:span text:style-name="T28">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7">Specifies the size of the font <text:span text:style-name="T28">(in points)</text:span> to use. Default is 12. Minimum is 4 and maximum is 30. </text:p>
      <text:h text:style-name="Heading_20_3" text:outline-level="3"><text:bookmark-start text:name="__RefHeading___Toc6533_3940028066"/><text:span text:style-name="T30">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80.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List_20_Heading"><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List_20_Heading"><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7">Used to disable the margin bell after column 72. Default is enabled. </text:p>
      <text:h text:style-name="Heading_20_3"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oft-page-break/><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7">Sets server mode, where the ASR33 listens on the specified host and port, simulating a standalone case where the ASR33 waits for connections from remote ASR33s. Value is ignored, but must be present ("=" at least) when given on the commandline. <text:span text:style-name="T28">Property must be absent to turn off.</text:span></text:p>
      <text:h text:style-name="P4" text:outline-level="3"><text:bookmark-start text:name="__RefHeading___Toc6535_3940028066 Copy 1"/><text:span text:style-name="T29">Tty</text:span> Properties<text:bookmark-end text:name="__RefHeading___Toc6535_3940028066 Copy 1"/></text:h>
      <text:p text:style-name="P12"><text:span text:style-name="T6">asr33_</text:span><text:span text:style-name="T9">tty</text:span><text:span text:style-name="T7">=</text:span><text:span text:style-name="T4">device</text:span></text:p>
      <text:p text:style-name="P9">The <text:span text:style-name="T29">device path of the serial port</text:span> to connect to. This is the same as the first non-property argument on the command line. </text:p>
      <text:p text:style-name="P12"><text:span text:style-name="T6">asr33_</text:span><text:span text:style-name="T9">baud</text:span><text:span text:style-name="T7">=</text:span><text:span text:style-name="T4">speed</text:span></text:p>
      <text:p text:style-name="P9">The <text:span text:style-name="T29">speed (baud) to use on the selected serial port</text:span>. This is the same as the second non-property argument on the command line. </text:p>
      <text:p text:style-name="P12"><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08T15:09:05.439951799</dc:date>
    <meta:editing-duration>PT24M44S</meta:editing-duration>
    <meta:editing-cycles>9</meta:editing-cycles>
    <meta:generator>LibreOffice/24.2.7.2$Linux_X86_64 LibreOffice_project/420$Build-2</meta:generator>
    <meta:print-date>2026-06-08T14:58:45.905183067</meta:print-date>
    <meta:printed-by>PDF files</meta:printed-by>
    <meta:document-statistic meta:table-count="0" meta:image-count="0" meta:object-count="0" meta:page-count="5" meta:paragraph-count="105" meta:word-count="1541" meta:character-count="9480" meta:non-whitespace-character-count="7990"/>
  </office:meta>
</office:document-meta>
</file>